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29A0000032C5BA5690F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391000002B6419E8A49.png" manifest:media-type="image/png"/>
  <manifest:file-entry manifest:full-path="Pictures/100000010000073C0000037C46B070DC.png" manifest:media-type="image/png"/>
  <manifest:file-entry manifest:full-path="Pictures/10000000000005E2000004DEEC062B6B.jpg" manifest:media-type="image/jpeg"/>
  <manifest:file-entry manifest:full-path="Pictures/1000000100000447000002B2C5226910.png" manifest:media-type="image/png"/>
  <manifest:file-entry manifest:full-path="Pictures/100000010000023D00000291A5A749F0.png" manifest:media-type="image/png"/>
  <manifest:file-entry manifest:full-path="Pictures/1000000100000760000003A6C06D8C4F.png" manifest:media-type="image/png"/>
  <manifest:file-entry manifest:full-path="Pictures/10000001000006FB0000039761EC5A0C.png" manifest:media-type="image/png"/>
  <manifest:file-entry manifest:full-path="Pictures/100000010000074C0000037F08158C42.png" manifest:media-type="image/png"/>
  <manifest:file-entry manifest:full-path="Pictures/10000001000006D20000037D26116B0C.png" manifest:media-type="image/png"/>
  <manifest:file-entry manifest:full-path="Pictures/100000010000073C0000038383CD7A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text-align="start" style:justify-single-word="false" style:page-number="auto" fo:break-before="page"/>
      <style:text-properties fo:font-size="14pt" fo:font-weight="bold" officeooo:rsid="001acb93" officeooo:paragraph-rsid="001acb9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weight="bold" officeooo:paragraph-rsid="001f06f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1f06f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1f06f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paragraph-rsid="001f06f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1c49d" officeooo:paragraph-rsid="0021c49d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1c49d" officeooo:paragraph-rsid="0021c49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32280" officeooo:paragraph-rsid="00232280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2280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weight="normal" officeooo:paragraph-rsid="0023e15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e158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23e158" officeooo:paragraph-rsid="0023e158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532b2" officeooo:paragraph-rsid="002532b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532b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584d"/>
    </style:style>
    <style:style style:name="T3" style:family="text">
      <style:text-properties officeooo:rsid="0020fabd"/>
    </style:style>
    <style:style style:name="T4" style:family="text">
      <style:text-properties fo:font-style="normal" officeooo:rsid="001f06fe" style:font-style-asian="normal" style:font-style-complex="normal"/>
    </style:style>
    <style:style style:name="T5" style:family="text">
      <style:text-properties officeooo:rsid="001f8935"/>
    </style:style>
    <style:style style:name="T6" style:family="text">
      <style:text-properties officeooo:rsid="00232280"/>
    </style:style>
    <style:style style:name="T7" style:family="text">
      <style:text-properties fo:font-size="13pt" fo:font-style="italic" fo:font-weight="bold" officeooo:rsid="0023e158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size="12pt" fo:font-style="italic" fo:font-weight="normal" officeooo:rsid="002532b2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fo:font-weight="normal" officeooo:rsid="002532b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2532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3208: Advanced Web Design and Development </text:p>
      <text:p text:style-name="P1">Logbook Report </text:p>
      <text:p text:style-name="P2"><text:span text:style-name="T1">Student Name:</text:span> <text:span text:style-name="T2">Abdullahi Mohammed Mahid.</text:span></text:p>
      <text:p text:style-name="P2"><text:span text:style-name="T1">Admission Number:</text:span> <text:span text:style-name="T2">BSCCS/2024/38409</text:span></text:p>
      <text:p text:style-name="P1">Course/Class: </text:p>
      <text:p text:style-name="P2"><text:span text:style-name="T1">Unit Code</text:span>: <text:span text:style-name="T2">BIT3208</text:span></text:p>
      <text:p text:style-name="P2"><text:span text:style-name="T1">Unit Name: </text:span>Advanced Web Design and Development </text:p>
      <text:p text:style-name="P3">Lecturer Name: </text:p>
      <text:p text:style-name="P2"><text:span text:style-name="T1">Semester/Year</text:span>: <text:span text:style-name="T2">Sem II ,Year IV</text:span></text:p>
      <text:p text:style-name="P2"/>
      <text:p text:style-name="P3">Project Title: Smart E-Commerce Web Application </text:p>
      <text:p text:style-name="P1">Technologies: PHP + MySQL, HTML5, CSS3, JavaScript, Bootstrap </text:p>
      <text:p text:style-name="P2"><text:span text:style-name="T1">GitHub Repository</text:span>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2"/>
      <text:p text:style-name="P4">Table of Contents</text:p>
      <text:p text:style-name="P5"/>
      <text:p text:style-name="P6">Week 1: Local Environment Setup</text:p>
      <text:p text:style-name="P7">Title: Installation and Testing of Local Development Environment </text:p>
      <text:p text:style-name="P7">Fig 1: XAMPP Installation Success </text:p>
      <text:p text:style-name="P8"><draw:frame draw:style-name="fr1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.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Fig 2: Apache and MySQL Running </text:p>
      <text:p text:style-name="P8"><draw:frame draw:style-name="fr1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running successfully. </text:p>
      <text:p text:style-name="P8"/>
      <text:p text:style-name="P10">Fig 3: Localhost Test Page </text:p>
      <text:p text:style-name="P11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server is active. </text:p>
      <text:p text:style-name="P10"><text:soft-page-break/>Fig 4: Hello World Test Page </text:p>
      <text:p text:style-name="P11"><draw:frame draw:style-name="fr2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2"/>
      <text:p text:style-name="P10">Fig 5: Database Connection Test </text:p>
      <text:p text:style-name="P11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12"><text:soft-page-break/>Reflection: This week I installed XAMPP and configured Apache and MySQL services on my local machine. I tested the local server by accessing localhost on my browser and confirmed it was running correctly <text:span text:style-name="T3">then</text:span> I <text:s/><text:span text:style-name="T3">also </text:span>created a basic PHP Hello World page to verify server-side scripting was functional. Finally I tested database connectivity using mysqli_connect() which confirmed PHP and MySQL were properly linked. The main challenge was a UAC installation warning which was <text:span text:style-name="T3">solved</text:span> by installing XAMPP directly to C:\xampp instead of Program Files. </text:p>
      <text:p text:style-name="P13"><text:span text:style-name="T4">Week 2 </text:span>: Wireframes and UI Design </text:p>
      <text:p text:style-name="P14">Title: Designing the Blackline Supply E-Commerce Interface .</text:p>
      <text:p text:style-name="P14"/>
      <text:p text:style-name="P14">Fig 1: Hand-Drawn Wireframe</text:p>
      <text:p text:style-name="P14"><draw:frame draw:style-name="fr1" draw:name="Image6" text:anchor-type="char" svg:width="4.7409in" svg:height="5.1902in" draw:z-index="5"><draw:image xlink:href="Pictures/10000000000005E2000004DEEC062B6B.jpg" xlink:type="simple" xlink:show="embed" xlink:actuate="onLoad" draw:mime-type="image/jpeg"/></draw:frame><text:s/></text:p>
      <text:p text:style-name="P15">Fig 1: Hand-drawn wireframe showing the initial layout plan for the Blackline Supply homepage. </text:p>
      <text:p text:style-name="P15"/>
      <text:p text:style-name="P15"/>
      <text:p text:style-name="P15"/>
      <text:p text:style-name="P16"><text:soft-page-break/>Fig 2: Desktop Mockup </text:p>
      <text:p text:style-name="P16"><draw:frame draw:style-name="fr2" draw:name="Image7" text:anchor-type="char" svg:width="4.7402in" svg:height="3.95in" draw:z-index="7"><draw:image xlink:href="Pictures/1000000100000447000002B2C5226910.png" xlink:type="simple" xlink:show="embed" xlink:actuate="onLoad" draw:mime-type="image/png"/></draw:frame></text:p>
      <text:p text:style-name="P15">Fig 2: Draw.io desktop mockup showing the homepage layout of Blackline Supply at 1440x1024 resolution. 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ig 3: Mobile Mockup </text:p>
      <text:p text:style-name="P15"><draw:frame draw:style-name="fr1" draw:name="Image8" text:anchor-type="char" svg:width="4.7402in" svg:height="4.7701in" draw:z-index="6"><draw:image xlink:href="Pictures/100000010000029A0000032C5BA5690F.png" xlink:type="simple" xlink:show="embed" xlink:actuate="onLoad" draw:mime-type="image/png"/></draw:frame>Fig 3: Draw.io mobile mockup showing the responsive layout of Blackline Supply at 390x844 resolution. 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ig 4: Color Scheme </text:p>
      <text:p text:style-name="P15"><draw:frame draw:style-name="fr2" draw:name="Image9" text:anchor-type="char" svg:width="4.7402in" svg:height="4.7701in" draw:z-index="8"><draw:image xlink:href="Pictures/100000010000023D00000291A5A749F0.png" xlink:type="simple" xlink:show="embed" xlink:actuate="onLoad" draw:mime-type="image/png"/></draw:frame>Fig 4: <text:s/><text:span text:style-name="T5">The c</text:span>ol<text:span text:style-name="T5">ou</text:span>r palette for Blackline Supply showing primary, secondary, accent and background colo<text:span text:style-name="T5">u</text:span>rs. 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><text:soft-page-break/></text:p>
      <text:p text:style-name="P16">Fig 5: Navigation Structure </text:p>
      <text:p text:style-name="P15"><draw:frame draw:style-name="fr2" draw:name="Image10" text:anchor-type="char" svg:width="4.7402in" svg:height="4.7701in" draw:z-index="9"><draw:image xlink:href="Pictures/1000000100000391000002B6419E8A49.png" xlink:type="simple" xlink:show="embed" xlink:actuate="onLoad" draw:mime-type="image/png"/></draw:frame>Fig 5: Flowchart showing the navigation structure and page connections of the Blackline Supply . </text:p>
      <text:p text:style-name="P15"/>
      <text:p text:style-name="P17">Reflection: This week I designed the visual layout of the Blackline supply ecommerce platform . <text:span text:style-name="T3">This helped me get a clearer picture of what the frontend structure would look like before beginning coding .</text:span> I began with a handrawn wireframe to plan the homepage layout then moving to the desktop and mobile mockups using draw.io . I also designed the <text:span text:style-name="T3">colour palette for the web application and finally the flowchart showing the navigation structure through also using draw.io . </text:span></text:p>
      <text:p text:style-name="P18">Week 3: Javascript and PHP basics</text:p>
      <text:p text:style-name="P19">Title :Implementing client-side validation and and testing server side scripting.</text:p>
      <text:p text:style-name="P20">Fig 1: Registration form </text:p>
      <text:p text:style-name="P21"><draw:frame draw:style-name="fr2" draw:name="Image11" text:anchor-type="char" svg:width="4.7402in" svg:height="3.1in" draw:z-index="10"><draw:image xlink:href="Pictures/1000000100000760000003A6C06D8C4F.png" xlink:type="simple" xlink:show="embed" xlink:actuate="onLoad" draw:mime-type="image/png"/></draw:frame>Fig 1 showing registration form <text:span text:style-name="T6">for blackline supply with validation .</text:span></text:p>
      <text:p text:style-name="P22">Fig 2: Password Strength checker</text:p>
      <text:p text:style-name="P23"><draw:frame draw:style-name="fr2" draw:name="Image12" text:anchor-type="char" svg:width="4.7402in" svg:height="3.2201in" draw:z-index="11"><draw:image xlink:href="Pictures/10000001000006FB0000039761EC5A0C.png" xlink:type="simple" xlink:show="embed" xlink:actuate="onLoad" draw:mime-type="image/png"/></draw:frame>fig 2: showing password strength checker working </text:p>
      <text:p text:style-name="P24"><text:soft-page-break/><text:span text:style-name="T7">Fig 3:</text:span><text:span text:style-name="T1">DOM manipulation demo </text:span></text:p>
      <text:p text:style-name="P25"><draw:frame draw:style-name="fr2" draw:name="Image13" text:anchor-type="char" svg:width="4.7402in" svg:height="3in" draw:z-index="12"><draw:image xlink:href="Pictures/100000010000074C0000037F08158C42.png" xlink:type="simple" xlink:show="embed" xlink:actuate="onLoad" draw:mime-type="image/png"/></draw:frame>fig 3 showing dom manipulation and products can be added and removed <text:s/>.</text:p>
      <text:p text:style-name="P26">Fig 4:PHP basics syntax page .</text:p>
      <text:p text:style-name="P25"><draw:frame draw:style-name="fr2" draw:name="Image14" text:anchor-type="char" svg:width="4.7402in" svg:height="3.2098in" draw:z-index="13"><draw:image xlink:href="Pictures/10000001000006D20000037D26116B0C.png" xlink:type="simple" xlink:show="embed" xlink:actuate="onLoad" draw:mime-type="image/png"/></draw:frame>Fig 4 Php basics page showing variables , conditionals and arrays </text:p>
      <text:p text:style-name="P25"/>
      <text:p text:style-name="P25"/>
      <text:p text:style-name="P25"/>
      <text:p text:style-name="P25"/>
      <text:p text:style-name="P26"><text:soft-page-break/>Fig : Improved Database connection </text:p>
      <text:p text:style-name="P27"><draw:frame draw:style-name="fr2" draw:name="Image15" text:anchor-type="char" svg:width="4.7402in" svg:height="3.0402in" draw:z-index="14"><draw:image xlink:href="Pictures/100000010000073C0000038383CD7A8A.png" xlink:type="simple" xlink:show="embed" xlink:actuate="onLoad" draw:mime-type="image/png"/></draw:frame>Fig 5 showing php database connection confirming succesful connection to the database.</text:p>
      <text:p text:style-name="P28"><text:span text:style-name="T8">Reflection - </text:span><text:span text:style-name="T9">T</text:span>his week I implemented JavaScript form validation and a password strength checker for the Blackline Supply registration page. I also built a DOM manipulation demo showing how to dynamically add, update and remove elements <text:span text:style-name="T10">and</text:span> I <text:s/><text:span text:style-name="T10">also </text:span>tested PHP syntax using variables, conditionals, arrays and loops, and improved the database connection script with detailed output confirmation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11M28S</meta:editing-duration>
    <meta:editing-cycles>4</meta:editing-cycles>
    <meta:generator>LibreOffice/25.2.7.2$Windows_X86_64 LibreOffice_project/5cbfd1ab6520636bb5f7b99185aa69bd7456825d</meta:generator>
    <dc:date>2026-05-27T12:14:18.384339100</dc:date>
    <meta:document-statistic meta:table-count="0" meta:image-count="15" meta:object-count="0" meta:page-count="14" meta:paragraph-count="53" meta:word-count="577" meta:character-count="3864" meta:non-whitespace-character-count="3297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
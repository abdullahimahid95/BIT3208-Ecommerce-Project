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B8000003289B6EBB8C.png" manifest:media-type="image/png"/>
  <manifest:file-entry manifest:full-path="Pictures/100000010000035A000002861D67D48B.png" manifest:media-type="image/png"/>
  <manifest:file-entry manifest:full-path="Pictures/10000001000003DE00000295C885A261.png" manifest:media-type="image/png"/>
  <manifest:file-entry manifest:full-path="Pictures/100000010000077A000003A85DF9584C.png" manifest:media-type="image/png"/>
  <manifest:file-entry manifest:full-path="Pictures/100000010000073C0000037C46B070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master-page-name="">
      <style:paragraph-properties fo:text-align="start" style:justify-single-word="false" style:page-number="auto" fo:break-before="page"/>
      <style:text-properties fo:font-size="14pt" fo:font-weight="bold" officeooo:rsid="001acb93" officeooo:paragraph-rsid="001acb9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acb93" officeooo:paragraph-rsid="001acb93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1acb93" officeooo:paragraph-rsid="001acb93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normal" fo:font-weight="bold" officeooo:rsid="001acb93" officeooo:paragraph-rsid="001acb93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bold" officeooo:rsid="001acb93" officeooo:paragraph-rsid="001acb93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italic" fo:font-weight="normal" officeooo:rsid="001acb93" officeooo:paragraph-rsid="001acb93" style:font-size-asian="13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normal" officeooo:rsid="001acb93" officeooo:paragraph-rsid="001acb93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1a58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T3208: Advanced Web Design and Development </text:p>
      <text:p text:style-name="P1">Logbook Report </text:p>
      <text:p text:style-name="P1">Student Name: <text:span text:style-name="T1">Abdullahi Mohammed Mahid.</text:span></text:p>
      <text:p text:style-name="P1">Admission Number: <text:span text:style-name="T1">BSCCS/2024/38409</text:span></text:p>
      <text:p text:style-name="P1">Course/Class: </text:p>
      <text:p text:style-name="P1">Unit Code: <text:span text:style-name="T1">BIT3208</text:span></text:p>
      <text:p text:style-name="P1">Unit Name: Advanced Web Design and Development </text:p>
      <text:p text:style-name="P1">Lecturer Name: </text:p>
      <text:p text:style-name="P1">Semester/Year: <text:span text:style-name="T1">Sem II ,Year IV</text:span></text:p>
      <text:p text:style-name="P1"/>
      <text:p text:style-name="P1">Project Title: Smart E-Commerce Web Application </text:p>
      <text:p text:style-name="P1">Technologies: PHP + MySQL, HTML5, CSS3, JavaScript, Bootstrap </text:p>
      <text:p text:style-name="P1">GitHub Repository: <text:a xlink:type="simple" xlink:href="https://github.com/abdullahimahid95/BIT3208-Ecommerce-Project" text:style-name="Internet_20_link" text:visited-style-name="Visited_20_Internet_20_Link">https://github.com/abdullahimahid95/BIT3208-Ecommerce-Project</text:a></text:p>
      <text:p text:style-name="P1"/>
      <text:p text:style-name="P2">Table of Contents</text:p>
      <text:p text:style-name="P3"/>
      <text:p text:style-name="P4">Week 1: Local Environment Setup</text:p>
      <text:p text:style-name="P5">Title: Installation and Testing of Local Development Environment </text:p>
      <text:p text:style-name="P5">Fig 1: XAMPP Installation Success </text:p>
      <text:p text:style-name="P6"><draw:frame draw:style-name="fr1" draw:name="Image1" text:anchor-type="char" svg:width="4.7201in" svg:height="4.7201in" draw:z-index="0"><draw:image xlink:href="Pictures/100000010000035A000002861D67D48B.png" xlink:type="simple" xlink:show="embed" xlink:actuate="onLoad" draw:mime-type="image/png"/></draw:frame>Fig 1: XAMPP installation wizard showing successful setup on Windows. 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Fig 2: Apache and MySQL Running </text:p>
      <text:p text:style-name="P6"><draw:frame draw:style-name="fr1" draw:name="Image2" text:anchor-type="char" svg:width="4.7201in" svg:height="4.1902in" draw:z-index="1"><draw:image xlink:href="Pictures/10000001000003DE00000295C885A261.png" xlink:type="simple" xlink:show="embed" xlink:actuate="onLoad" draw:mime-type="image/png"/></draw:frame>Fig 2: XAMPP Control Panel showing Apache and MySQL services running successfully. </text:p>
      <text:p text:style-name="P6"/>
      <text:p text:style-name="P8">Fig 3: Localhost Test Page </text:p>
      <text:p text:style-name="P9"><draw:frame draw:style-name="fr2" draw:name="Image3" text:anchor-type="char" svg:width="4.7201in" svg:height="3.0701in" draw:z-index="2"><draw:image xlink:href="Pictures/100000010000077A000003A85DF9584C.png" xlink:type="simple" xlink:show="embed" xlink:actuate="onLoad" draw:mime-type="image/png"/></draw:frame>Fig 3: Browser displaying the XAMPP localhost welcome page confirming the server is active. </text:p>
      <text:p text:style-name="P8"><text:soft-page-break/>Fig 4: Hello World Test Page </text:p>
      <text:p text:style-name="P9"><draw:frame draw:style-name="fr2" draw:name="Image4" text:anchor-type="char" svg:width="4.7201in" svg:height="3.0201in" draw:z-index="3"><draw:image xlink:href="Pictures/100000010000073C0000037C46B070DC.png" xlink:type="simple" xlink:show="embed" xlink:actuate="onLoad" draw:mime-type="image/png"/></draw:frame>Fig 4: Browser displaying Hello World output from index.php confirming PHP is working. </text:p>
      <text:p text:style-name="P10"/>
      <text:p text:style-name="P8">Fig 5: Database Connection Test </text:p>
      <text:p text:style-name="P9"><draw:frame draw:style-name="fr2" draw:name="Image5" text:anchor-type="char" svg:width="4.7201in" svg:height="3.4598in" draw:z-index="4"><draw:image xlink:href="Pictures/10000001000005B8000003289B6EBB8C.png" xlink:type="simple" xlink:show="embed" xlink:actuate="onLoad" draw:mime-type="image/png"/></draw:frame>Fig 5: Browser displaying successful database connection message using mysqli_connect() in PHP. </text:p>
      <text:p text:style-name="P9"><text:soft-page-break/>Student Reflection: This week I installed XAMPP and configured Apache and MySQL services on my local machine. I tested the local server by accessing localhost on my browser and confirmed it was running correctly. I created a basic PHP Hello World page to verify server-side scripting was functional. Finally I tested database connectivity using mysqli_connect() which confirmed PHP and MySQL were properly linked. The main challenge was a UAC installation warning which was resolved by installing XAMPP directly to C:\xampp instead of Program File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99in" fo:margin-bottom="0.0799in" style:contextual-spacing="false" fo:line-height="150%" fo:text-align="justify" style:justify-single-word="false" fo:text-indent="0.5in" style:auto-text-indent="false"/>
      <style:text-properties style:font-name="Times New Roman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4T11:18:50.804529300</meta:creation-date>
    <dc:title>E Commerce report template</dc:title>
    <meta:editing-duration>PT2M57S</meta:editing-duration>
    <meta:editing-cycles>2</meta:editing-cycles>
    <meta:generator>LibreOffice/25.2.7.2$Windows_X86_64 LibreOffice_project/5cbfd1ab6520636bb5f7b99185aa69bd7456825d</meta:generator>
    <dc:date>2026-05-24T12:09:37.389532000</dc:date>
    <meta:document-statistic meta:table-count="0" meta:image-count="5" meta:object-count="0" meta:page-count="6" meta:paragraph-count="26" meta:word-count="239" meta:character-count="1692" meta:non-whitespace-character-count="1460"/>
    <meta:template xlink:type="simple" xlink:actuate="onRequest" xlink:title="E Commerce report template" xlink:href="../../../../../Users/m9nsu/AppData/Roaming/LibreOffice/4/user/template/E%20Commerce%20report%20template.ott" meta:date="2026-05-24T11:18:50.279235600"/>
  </office:meta>
</office:document-meta>
</file>